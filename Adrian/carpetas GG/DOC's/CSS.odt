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05f0d8" officeooo:paragraph-rsid="0005f0d8" style:font-size-asian="20pt" style:font-size-complex="20pt"/>
    </style:style>
    <style:style style:name="P2" style:family="paragraph" style:parent-style-name="Standard">
      <style:text-properties fo:font-size="9pt" officeooo:rsid="0005f0d8" officeooo:paragraph-rsid="0005f0d8" style:font-size-asian="7.84999990463257pt" style:font-size-complex="9pt"/>
    </style:style>
    <style:style style:name="P3" style:family="paragraph" style:parent-style-name="Standard">
      <style:text-properties fo:font-size="12pt" officeooo:rsid="0005f0d8" officeooo:paragraph-rsid="0005f0d8" style:font-size-asian="10.5pt" style:font-size-complex="12pt"/>
    </style:style>
    <style:style style:name="P4" style:family="paragraph" style:parent-style-name="Standard">
      <style:text-properties fo:font-size="12pt" officeooo:rsid="0005f0d8" officeooo:paragraph-rsid="0005f0d8" fo:background-color="#ffff00" style:font-size-asian="10.5pt" style:font-size-complex="12pt"/>
    </style:style>
    <style:style style:name="P5" style:family="paragraph" style:parent-style-name="Standard">
      <style:text-properties fo:font-size="12pt" officeooo:rsid="0005f0d8" officeooo:paragraph-rsid="0005f0d8" fo:background-color="#81d41a" style:font-size-asian="10.5pt" style:font-size-complex="12pt"/>
    </style:style>
    <style:style style:name="P6" style:family="paragraph" style:parent-style-name="Standard">
      <style:text-properties fo:font-size="12pt" officeooo:rsid="00070246" officeooo:paragraph-rsid="00070246" fo:background-color="transparent" style:font-size-asian="10.5pt" style:font-size-complex="12pt"/>
    </style:style>
    <style:style style:name="P7" style:family="paragraph" style:parent-style-name="Standard">
      <style:text-properties fo:font-size="12pt" officeooo:rsid="00071613" officeooo:paragraph-rsid="00071613" fo:background-color="transparent" style:font-size-asian="10.5pt" style:font-size-complex="12pt"/>
    </style:style>
    <style:style style:name="P8" style:family="paragraph" style:parent-style-name="Standard">
      <style:text-properties officeooo:rsid="00071613" officeooo:paragraph-rsid="00071613"/>
    </style:style>
    <style:style style:name="P9" style:family="paragraph" style:parent-style-name="Text_20_body">
      <style:text-properties officeooo:rsid="00071613" officeooo:paragraph-rsid="00071613"/>
    </style:style>
    <style:style style:name="P10" style:family="paragraph" style:parent-style-name="Heading_20_3">
      <style:text-properties fo:font-size="12pt" fo:font-weight="normal" officeooo:rsid="00071613" officeooo:paragraph-rsid="00071613" fo:background-color="transparent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officeooo:rsid="00071613"/>
    </style:style>
    <style:style style:name="P12" style:family="paragraph" style:parent-style-name="Text_20_body" style:list-style-name="L1">
      <style:text-properties fo:font-weight="normal" officeooo:rsid="00071613" style:font-weight-asian="normal" style:font-weight-complex="normal"/>
    </style:style>
    <style:style style:name="P13" style:family="paragraph" style:parent-style-name="Heading_20_3">
      <style:text-properties fo:font-size="12pt" fo:font-weight="normal" officeooo:rsid="00071613" style:font-size-asian="10.5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font-weight="normal" officeooo:rsid="00071613" style:font-weight-asian="normal" style:font-weight-complex="normal"/>
    </style:style>
    <style:style style:name="T1" style:family="text">
      <style:text-properties officeooo:rsid="00066727"/>
    </style:style>
    <style:style style:name="T2" style:family="text">
      <style:text-properties fo:font-size="12pt" fo:background-color="transparent" loext:char-shading-value="0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lo CSS <text:span text:style-name="T1">en HTML</text:span></text:p>
      <text:p text:style-name="P2">Miguel Adrian Rivera Jaime</text:p>
      <text:p text:style-name="P2"/>
      <text:p text:style-name="P3">¿Qué es &lt;div&gt;?</text:p>
      <text:p text:style-name="P3"/>
      <text:p text:style-name="P3">La etiqueta de divisiòn HTML o “div”, sirve para agrupar conjuntos de contenido similares en una pagina web, Se puede usar como contenedor genérico para asociar contenido similar.</text:p>
      <text:p text:style-name="P3"/>
      <text:p text:style-name="P3">Diferencia entre las etiquetas div y section:</text:p>
      <text:p text:style-name="P3"/>
      <text:p text:style-name="P3">Su principal diferencia que se puede resumir en una palabra es la semantica. &lt;section se usa para para darle sentido lógico a la lectura del documento y &lt;div&gt; es para el apartado visual del diseño de la pagina web.</text:p>
      <text:p text:style-name="P3"/>
      <text:p text:style-name="P3">Ejemplos:</text:p>
      <text:p text:style-name="P3"/>
      <text:p text:style-name="P4">&lt;section&gt;</text:p>
      <text:p text:style-name="P4"><text:s text:c="2"/>&lt;h2&gt;Nuestros Servicios&lt;/h2&gt;</text:p>
      <text:p text:style-name="P4"><text:s text:c="2"/>&lt;p&gt;Ofrecemos desarrollo web, mantenimiento de servidores y consultoría.&lt;/p&gt;</text:p>
      <text:p text:style-name="P4">&lt;/section&gt;</text:p>
      <text:p text:style-name="P4"/>
      <text:p text:style-name="P5">&lt;div class="tarjeta-estilizada-con-sombra"&gt;</text:p>
      <text:p text:style-name="P5"><text:s text:c="2"/>&lt;img src="icono.png" alt="Icono de servicio"&gt;</text:p>
      <text:p text:style-name="P5"><text:s text:c="2"/>&lt;p&gt;Servicio rápido y eficiente.&lt;/p&gt;</text:p>
      <text:p text:style-name="P5">&lt;/div&gt;</text:p>
      <text:p text:style-name="P5"/>
      <text:p text:style-name="P5">.tarjeta-estilizada-con-sombra {</text:p>
      <text:p text:style-name="P5"><text:s text:c="2"/>box-shadow: 2px 2px 10px rgba(0, 0, 0, 0.2);</text:p>
      <text:p text:style-name="P5"><text:s text:c="2"/>padding: 15px;</text:p>
      <text:p text:style-name="P5"><text:s text:c="2"/>border-radius: 8px;</text:p>
      <text:p text:style-name="P5">}</text:p>
      <text:p text:style-name="P5"/>
      <text:p text:style-name="P6">Elemento de bloque(Block-level)</text:p>
      <text:p text:style-name="P6"/>
      <text:p text:style-name="P6">La etiqueta &lt;div&gt; siempre intentará ocupar el 100% del ancho disponible del contenedor padre, de izquierada a derecha.</text:p>
      <text:p text:style-name="P6">Al tener una naturaleza de bloque, siempre fuerza un salto de linea antes y despues de él. No se puede poner dos &lt;div&gt; uno a lado de otro a menos que se use CSS como display: flex o float).</text:p>
      <text:p text:style-name="P6"/>
      <text:p text:style-name="P7">Los atributos dentro de los &lt;div&gt;</text:p>
      <text:p text:style-name="P7"/>
      <text:p text:style-name="P7">Dentro de los div, se usan atributos, pues un div sin atributos no sirve de mucho. Esta ocupa identificadores.</text:p>
      <text:p text:style-name="P8"><text:span text:style-name="T2">class: Se usa para aplicar el mismo estilo a múltiples </text:span><text:span text:style-name="Source_20_Text"><text:span text:style-name="T2">&lt;div&gt;</text:span></text:span><text:span text:style-name="T2"> (ej. </text:span><text:span text:style-name="Source_20_Text"><text:span text:style-name="T2">&lt;div class="tarjeta"&gt;</text:span></text:span><text:span text:style-name="T2">).</text:span></text:p>
      <text:p text:style-name="P9">Id: Se usa para identificar un <text:span text:style-name="Source_20_Text">&lt;div&gt;</text:span> único en toda la página, ideal para manipularlo después con JavaScript (ej. <text:span text:style-name="Source_20_Text">&lt;div id="contenedor-principal"&gt;</text:span>).</text:p>
      <text:p text:style-name="P7"/>
      <text:h text:style-name="P10" text:outline-level="3"><text:soft-page-break/>Propiedades CSS Clave (El Modelo de Caja)</text:h>
      <text:p text:style-name="P11"><text:span text:style-name="T3">Para complementar los atributos, estas propiedades le dan forma física al </text:span><text:span text:style-name="Source_20_Text"><text:span text:style-name="T3">&lt;div&gt;</text:span></text:span><text:span text:style-name="T3">:</text:span></text:p>
      <text:list text:style-name="L1">
        <text:list-item>
          <text:p text:style-name="P12">width y height: Definen el ancho y el alto del contenedor.</text:p>
        </text:list-item>
        <text:list-item>
          <text:p text:style-name="P12">padding: Es el relleno o espacio interno (la distancia entre el borde del div y su contenido).</text:p>
        </text:list-item>
        <text:list-item>
          <text:p text:style-name="P12">margin: Es el margen o espacio externo (sirve para separar este div de otros elementos).</text:p>
        </text:list-item>
        <text:list-item>
          <text:p text:style-name="P12">border: La línea que delimita el perímetro del contenedor.</text:p>
        </text:list-item>
      </text:list>
      <text:h text:style-name="P13" text:outline-level="3">Propiedades CSS de Layout (Distribución)</text:h>
      <text:list text:style-name="L2">
        <text:list-item>
          <text:p text:style-name="P14">display: flex; (Flexbox): Convierte el div en un contenedor flexible, ideal para alinear elementos en fila o columna.</text:p>
        </text:list-item>
        <text:list-item>
          <text:p text:style-name="P14">display: grid; (CSS Grid): Transforma el div en una cuadrícula bidimensional, perfecto para maquetar interfaces.</text:p>
        </text:list-item>
      </text:list>
      <text:p text:style-name="P7"/>
      <text:p text:style-name="P7">¿Qué es la Divitis?</text:p>
      <text:p text:style-name="P7"/>
      <text:p text:style-name="P7">Es un término coloquial en el desarrollo web para describir el <text:span text:style-name="T3">abuso</text:span> de la etiqueta <text:span text:style-name="Source_20_Text">&lt;div&gt;</text:span>. Ocurre cuando un programador envuelve absolutamente todo en <text:span text:style-name="Source_20_Text">&lt;div&gt;</text:span> anidados sin control (ej. un div dentro de un div, dentro de otro div), haciendo que el código sea lento, difícil de leer y muy pesado de manten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10:05:36.347258099</meta:creation-date>
    <dc:date>2026-06-26T11:31:23.786376185</dc:date>
    <meta:editing-duration>PT19M52S</meta:editing-duration>
    <meta:editing-cycles>2</meta:editing-cycles>
    <meta:generator>LibreOffice/25.8.7.3$Linux_X86_64 LibreOffice_project/fa62c01a44f84ad74d4904d2c894664e98fd27c1</meta:generator>
    <meta:document-statistic meta:table-count="0" meta:image-count="0" meta:object-count="0" meta:page-count="2" meta:paragraph-count="38" meta:word-count="417" meta:character-count="2612" meta:non-whitespace-character-count="2225"/>
  </office:meta>
</office:document-meta>
</file>